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ASUREMENTS ON ACTUAL SEQUENCER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Peak Watt</text:p>
          </table:table-cell>
          <table:table-cell table:style-name="ce1" office:value-type="string" calcext:value-type="string">
            <text:p>Average Watt</text:p>
          </table:table-cell>
          <table:table-cell table:style-name="ce1" office:value-type="string" calcext:value-type="string">
            <text:p>Voltage Monitor</text:p>
          </table:table-cell>
          <table:table-cell table:style-name="ce1" office:value-type="string" calcext:value-type="string">
            <text:p>Frequency (Hz)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58" calcext:value-type="float">
            <text:p>1.58</text:p>
          </table:table-cell>
          <table:table-cell table:style-name="ce2" office:value-type="float" office:value="430000000" calcext:value-type="float">
            <text:p>4.3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.14" calcext:value-type="float">
            <text:p>3.14</text:p>
          </table:table-cell>
          <table:table-cell table:style-name="ce2" office:value-type="float" office:value="430000000" calcext:value-type="float">
            <text:p>4.3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float" office:value="5.53" calcext:value-type="float">
            <text:p>5.53</text:p>
          </table:table-cell>
          <table:table-cell table:style-name="ce2" office:value-type="float" office:value="430000000" calcext:value-type="float">
            <text:p>4.3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51.7" calcext:value-type="float">
            <text:p>51.7</text:p>
          </table:table-cell>
          <table:table-cell table:style-name="ce1" office:value-type="float" office:value="7.26" calcext:value-type="float">
            <text:p>7.26</text:p>
          </table:table-cell>
          <table:table-cell table:style-name="ce2" office:value-type="float" office:value="430000000" calcext:value-type="float">
            <text:p>4.3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7.75" calcext:value-type="float">
            <text:p>7.75</text:p>
          </table:table-cell>
          <table:table-cell table:style-name="ce2" office:value-type="float" office:value="430000000" calcext:value-type="float">
            <text:p>4.30E+08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.3" calcext:value-type="float">
            <text:p>60.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.8" calcext:value-type="float">
            <text:p>7.8</text:p>
          </table:table-cell>
          <table:table-cell table:style-name="ce2" office:value-type="float" office:value="430000000" calcext:value-type="float">
            <text:p>4.30E+0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66" calcext:value-type="float">
            <text:p>1.66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3.28" calcext:value-type="float">
            <text:p>3.28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5.42" calcext:value-type="float">
            <text:p>5.42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6.6" calcext:value-type="float">
            <text:p>6.6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.9" calcext:value-type="float">
            <text:p>51.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.95" calcext:value-type="float">
            <text:p>6.95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.97" calcext:value-type="float">
            <text:p>6.97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4" calcext:value-type="float">
            <text:p>1.4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79" calcext:value-type="float">
            <text:p>2.79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24.9" calcext:value-type="float">
            <text:p>24.9</text:p>
          </table:table-cell>
          <table:table-cell table:style-name="ce1" office:value-type="float" office:value="5.1" calcext:value-type="float">
            <text:p>5.1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.7" calcext:value-type="float">
            <text:p>52.7</text:p>
          </table:table-cell>
          <table:table-cell table:style-name="ce1" office:value-type="float" office:value="51.3" calcext:value-type="float">
            <text:p>51.3</text:p>
          </table:table-cell>
          <table:table-cell table:style-name="ce1" office:value-type="float" office:value="7.31" calcext:value-type="float">
            <text:p>7.31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1.7" calcext:value-type="float">
            <text:p>61.7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7.94" calcext:value-type="float">
            <text:p>7.94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BASED ON PROVIDED CALIBRATION GRAPH (obsolet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tt Graph</text:p>
          </table:table-cell>
          <table:table-cell table:style-name="ce1" office:value-type="string" calcext:value-type="string">
            <text:p>Voltage Graph</text:p>
          </table:table-cell>
          <table:table-cell table:style-name="ce1" office:value-type="string" calcext:value-type="string">
            <text:p>Frequency (Hz)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00000000" calcext:value-type="float">
            <text:p>4.00E+08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00000000" calcext:value-type="float">
            <text:p>4.00E+08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00000000" calcext:value-type="float">
            <text:p>4.00E+08</text:p>
          </table:table-cell>
          <table:table-cell table:number-columns-repeated="1021"/>
        </table:table-row>
        <table:table-row table:style-name="ro1"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00000000" calcext:value-type="float">
            <text:p>4.00E+08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00000000" calcext:value-type="float">
            <text:p>4.00E+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21"/>
        </table:table-row>
        <table:table-row table:style-name="ro1">
          <table:table-cell table:style-name="ce1" office:value-type="float" office:value="62.5" calcext:value-type="float">
            <text:p>62.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40000000" calcext:value-type="float">
            <text:p>4.40E+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51.5" calcext:value-type="float">
            <text:p>51.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80000000" calcext:value-type="float">
            <text:p>4.80E+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60000000" calcext:value-type="float">
            <text:p>4.60E+08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60000000" calcext:value-type="float">
            <text:p>4.60E+08</text:p>
          </table:table-cell>
          <table:table-cell table:number-columns-repeated="1021"/>
        </table:table-row>
        <table:table-row table:style-name="ro1"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60000000" calcext:value-type="float">
            <text:p>4.60E+08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60000000" calcext:value-type="float">
            <text:p>4.60E+08</text:p>
          </table:table-cell>
          <table:table-cell table:number-columns-repeated="1021"/>
        </table:table-row>
        <table:table-row table:style-name="ro1"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60000000" calcext:value-type="float">
            <text:p>4.60E+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21"/>
        </table:table-row>
        <table:table-row table:style-name="ro1">
          <table:table-cell table:style-name="ce1" office:value-type="float" office:value="35.5" calcext:value-type="float">
            <text:p>35.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21"/>
        </table:table-row>
        <table:table-row table:style-name="ro1"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21"/>
        </table:table-row>
        <table:table-row table:style-name="ro1"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20000000" calcext:value-type="float">
            <text:p>4.20E+08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" meta:object-count="0"/>
    <meta:generator>LibreOfficeDev/6.0.5.2$Linux_X86_64 LibreOffice_project/</meta:generator>
  </office:meta>
</office:document-meta>
</file>